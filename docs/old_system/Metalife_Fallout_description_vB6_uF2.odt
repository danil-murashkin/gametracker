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d081"/>
    </style:style>
    <style:style style:name="P2" style:family="paragraph" style:parent-style-name="Standard">
      <style:text-properties officeooo:rsid="000dd1d4" officeooo:paragraph-rsid="001b46d8"/>
    </style:style>
    <style:style style:name="P3" style:family="paragraph" style:parent-style-name="Standard">
      <style:text-properties officeooo:rsid="000d650f" officeooo:paragraph-rsid="001b46d8"/>
    </style:style>
    <style:style style:name="P4" style:family="paragraph" style:parent-style-name="Standard">
      <style:text-properties officeooo:rsid="000d650f" officeooo:paragraph-rsid="001cd9f5"/>
    </style:style>
    <style:style style:name="P5" style:family="paragraph" style:parent-style-name="Standard">
      <style:text-properties officeooo:paragraph-rsid="001b46d8"/>
    </style:style>
    <style:style style:name="P6" style:family="paragraph" style:parent-style-name="Standard">
      <style:text-properties officeooo:rsid="001b46d8" officeooo:paragraph-rsid="001b46d8"/>
    </style:style>
    <style:style style:name="P7" style:family="paragraph" style:parent-style-name="Standard">
      <style:text-properties officeooo:rsid="001cd9f5" officeooo:paragraph-rsid="001cd9f5"/>
    </style:style>
    <style:style style:name="P8" style:family="paragraph" style:parent-style-name="Standard">
      <style:text-properties officeooo:rsid="001e2c91" officeooo:paragraph-rsid="001cd9f5"/>
    </style:style>
    <style:style style:name="P9" style:family="paragraph" style:parent-style-name="Standard">
      <style:text-properties officeooo:rsid="0018fad4" officeooo:paragraph-rsid="001cd9f5"/>
    </style:style>
    <style:style style:name="P10" style:family="paragraph" style:parent-style-name="Standard">
      <style:text-properties officeooo:rsid="001af734" officeooo:paragraph-rsid="001cd9f5"/>
    </style:style>
    <style:style style:name="P11" style:family="paragraph" style:parent-style-name="Standard">
      <style:text-properties officeooo:rsid="001ec646" officeooo:paragraph-rsid="001ec646"/>
    </style:style>
    <style:style style:name="P12" style:family="paragraph" style:parent-style-name="Standard">
      <style:text-properties officeooo:paragraph-rsid="001cd9f5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d081"/>
    </style:style>
    <style:style style:name="T3" style:family="text">
      <style:text-properties officeooo:rsid="00152cdf"/>
    </style:style>
    <style:style style:name="T4" style:family="text">
      <style:text-properties officeooo:rsid="000e09ac"/>
    </style:style>
    <style:style style:name="T5" style:family="text">
      <style:text-properties officeooo:rsid="0014f142"/>
    </style:style>
    <style:style style:name="T6" style:family="text">
      <style:text-properties officeooo:rsid="001db4b3"/>
    </style:style>
    <style:style style:name="T7" style:family="text">
      <style:text-properties officeooo:rsid="001b46d8"/>
    </style:style>
    <style:style style:name="T8" style:family="text">
      <style:text-properties officeooo:rsid="001b852e"/>
    </style:style>
    <style:style style:name="T9" style:family="text">
      <style:text-properties officeooo:rsid="0018fad4"/>
    </style:style>
    <style:style style:name="T10" style:family="text">
      <style:text-properties officeooo:rsid="001af734"/>
    </style:style>
    <style:style style:name="T11" style:family="text">
      <style:text-properties officeooo:rsid="001e2c91"/>
    </style:style>
    <style:style style:name="T12" style:family="text">
      <style:text-properties officeooo:rsid="001fc8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Номера параметров Metalife:</text:p>
      <text:p text:style-name="Standard"/>
      <text:p text:style-name="Standard">Основные параметры SPECIAL. Менять только при первоначальной прошивке персонажа.</text:p>
      <text:p text:style-name="Standard">STRENGTH 1</text:p>
      <text:p text:style-name="Standard">PERCEPTION 2</text:p>
      <text:p text:style-name="Standard">ENDURANCE 3</text:p>
      <text:p text:style-name="Standard">CHARISMA 4</text:p>
      <text:p text:style-name="Standard">INTELLECT 5</text:p>
      <text:p text:style-name="Standard">AGILITY 6</text:p>
      <text:p text:style-name="Standard">LUCK 7</text:p>
      <text:p text:style-name="Standard"/>
      <text:p text:style-name="Standard">Модификаторы SPECIAL. Менять препаратами или чем-то еще, что дает временное изменение характеристик.</text:p>
      <text:p text:style-name="Standard">MODSTRENGTH 8</text:p>
      <text:p text:style-name="Standard">MODPERCEPTION 9</text:p>
      <text:p text:style-name="Standard">MODENDURANCE 10</text:p>
      <text:p text:style-name="Standard">MODCHARISMA 11</text:p>
      <text:p text:style-name="Standard">MODINTELLECT 12</text:p>
      <text:p text:style-name="Standard">MODAGILITY 13</text:p>
      <text:p text:style-name="Standard">MODLUCK 14</text:p>
      <text:p text:style-name="Standard"/>
      <text:p text:style-name="Standard">Параметры SPECIAL вместе с модификаторами могут иметь значение от 1 до 10. Если значение выходит за эти пределы, то будет установлено ближайший предел, 1 или 10 соответственно.</text:p>
      <text:p text:style-name="Standard"/>
      <text:p text:style-name="Standard">Параметры жизнедеятельности.</text:p>
      <text:p text:style-name="Standard">LIFE 15<text:tab/><text:tab/>Очки жизни</text:p>
      <text:p text:style-name="Standard">MAXLIFE 16<text:tab/>Максимум очков жизни. Вычисляется сам по формуле <text:span text:style-name="T1">100 + (STRENGTH + MODSTRENGTH) * (ENDURANCE + MODENDURANCE) * 10 - RADDOSE / 8</text:span></text:p>
      <text:p text:style-name="Standard">FOOD 17<text:tab/><text:tab/>Запас еды в условных единицах</text:p>
      <text:p text:style-name="Standard">WATER 18<text:tab/><text:tab/>Запас воды в условных единицах</text:p>
      <text:p text:style-name="Standard">FOODPERCYC 19<text:tab/><text:tab/>Сколько единиц еды потребляется в секунду</text:p>
      <text:p text:style-name="Standard">WATERPERCYC 20<text:tab/><text:tab/>Сколько единиц воды потребляется в секунду</text:p>
      <text:p text:style-name="Standard">RADRESIST 21<text:tab/><text:tab/><text:tab/>Сопротивление радиации. Будет вычтено из RADNOW каждый раз.</text:p>
      <text:p text:style-name="Standard">CHEMBIORESIST 22<text:tab/>Сопротивление Химбио повреждению.</text:p>
      <text:p text:style-name="Standard">PHYSICALRESIST 23<text:tab/>Сопротивление Физическому повреждению.</text:p>
      <text:p text:style-name="Standard">RADDOSE 24<text:tab/>Доза Радиации. Каждую секунду к ней добавляется значение RADNOW.</text:p>
      <text:p text:style-name="Standard">RADNOW 25<text:tab/>Радиация на этот момент. Добавлять сюда препаратами и аномалиями.</text:p>
      <text:p text:style-name="Standard">CHEMBIO 26<text:tab/>Химбио воздействие на этот момент.</text:p>
      <text:p text:style-name="Standard">PHYSICAL 27<text:tab/>Физическое воздействие на этот момент.</text:p>
      <text:p text:style-name="Standard">PERK 28<text:tab/>0-нет, 1-Доктор, 2-Выживальщик, 3-Король вечеринок, <text:span text:style-name="T12">4 – оратор, 5 – инженер.</text:span></text:p>
      <text:p text:style-name="Standard">PLAYERID 29<text:tab/>Идентификационный номер игрока.</text:p>
      <text:p text:style-name="Standard">STARTFOOD 30<text:tab/>Стартовое количество пищи.</text:p>
      <text:p text:style-name="Standard">STARTWATER 31<text:tab/>Стартовое количество воды.</text:p>
      <text:p text:style-name="Standard">ARMORCHARGE 32<text:tab/>Заряд брони в секундах. Используется только для индикации.</text:p>
      <text:p text:style-name="Standard">AMBIENTTEMP 33<text:tab/>Базовая температура окружающей среды. Задавать в начале игры.</text:p>
      <text:p text:style-name="Standard">MODTEMP 34<text:tab/>Модификатор температуры. Задавать в аномалиях и препаратах.</text:p>
      <text:p text:style-name="Standard">PLAYERTEMP 35<text:tab/>Температура игрока. Рассчитывается как AMBIENTTEMP + MODTEMP каждую секунду. У игрока есть так называемый “температурный резерв”, вычисляемый по формуле <text:span text:style-name="T1">100 + (STRENGTH + MODSTRENGTH) * 200</text:span>. При превышении PLAYERTEMP этого резерва по модулю (то есть больше резерва или меньше минус резерва) изменение <text:soft-page-break/>PLAYERTEMP останавливается и игроку начинает наноситься урон (вычитается из LIFE) по формуле <text:span text:style-name="T1">(12 - ENDURANCE + MODENDURANCE) / 2</text:span>.</text:p>
      <text:p text:style-name="P1">SHELTER 36<text:span text:style-name="T2"> Для отключения всех остальных воздействий специальной аномалией <text:s/>“Убежище”. Командой s (set) устанавливается время в секундах, в течение которого на игрока не будет оказываться воздействие после покидания зоны покрытия Убежища. </text:span></text:p>
      <text:p text:style-name="Standard"/>
      <text:p text:style-name="Standard">Команды программатора:</text:p>
      <text:p text:style-name="Standard">nfcf<text:tab/><text:tab/>-<text:tab/>Форматировать метку (новую обязательно перед использованием)</text:p>
      <text:p text:style-name="Standard">nfce <text:tab/>-<text:tab/>Стереть метку</text:p>
      <text:p text:style-name="Standard">nfcr<text:tab/><text:tab/>-<text:tab/>Прочитать метку</text:p>
      <text:p text:style-name="Standard">nfcw<text:tab/>-<text:tab/>Записать метку. После команды через пробел укажите что записать. Перед записью предыдущее содержимое стирается автоматически.</text:p>
      <text:p text:style-name="Standard"/>
      <text:p text:style-name="P5"><text:span text:style-name="T7">Метка:</text:span></text:p>
      <text:p text:style-name="P3">PROTO:<text:tab/><text:tab/><text:span text:style-name="T5">Идентификатор протокола. Для этой версии uF2.</text:span></text:p>
      <text:p text:style-name="P3">NAME:<text:tab/><text:tab/><text:tab/><text:span text:style-name="T5">Название предмета.</text:span></text:p>
      <text:p text:style-name="P3">TYPE:<text:tab/><text:tab/><text:tab/><text:span text:style-name="T8">Особый</text:span> <text:span text:style-name="T8">тип предмета. Мясницкий нож каннибала CANN. Голотэйп HOLO.</text:span></text:p>
      <text:p text:style-name="P3">TEXT:<text:tab/><text:tab/><text:tab/><text:span text:style-name="T5">Описание предмета. Показывается бегущей строкой.</text:span></text:p>
      <text:p text:style-name="P3">USES:<text:tab/><text:tab/><text:tab/><text:span text:style-name="T5">Количество использований.</text:span></text:p>
      <text:p text:style-name="P7">PERK:<text:tab/><text:tab/><text:tab/>Перк: SUR – выживальщик может очистить от радиации, DOC – медик может восстановить препарат, ORA – речь для оратора.</text:p>
      <text:p text:style-name="P3">EFFECTS:<text:tab/><text:tab/><text:span text:style-name="T5">Эффекты. Должно идти последним, после него новой строкой эффекты.</text:span></text:p>
      <text:p text:style-name="P2">REVIVE: <text:s/><text:tab/><text:tab/><text:span text:style-name="T5">Оживить мертвого</text:span>. Обязательно укажите, через сколько минут в аргументе. <text:span text:style-name="T7">Эффекты игнорируются.</text:span></text:p>
      <text:p text:style-name="P2">RESET:<text:tab/><text:tab/><text:tab/><text:span text:style-name="T7">Сброс к начальным значениям. Эффекты игнорирутся. С аргументом SOFT не сбрасывает базовые значения SPECIAL.</text:span></text:p>
      <text:p text:style-name="P6">ONLY:<text:tab/><text:tab/><text:tab/>В качестве аргумента содержит условие, при невыполнении которого метка не сработает. Условие пишется тем же синтаксисом, как и в эффектах.</text:p>
      <text:p text:style-name="P2">SPLASH:<text:tab/><text:tab/><text:span text:style-name="T6">Излучать в течение полусекунды этот SSID.</text:span></text:p>
      <text:p text:style-name="P2">SPLASHPOW:<text:tab/><text:span text:style-name="T6">С какой мощностью излучать.</text:span></text:p>
      <text:p text:style-name="P2">SCAN:<text:tab/><text:tab/><text:tab/><text:span text:style-name="T3">Сканер - мастерский инструмент. Без аргументов.</text:span></text:p>
      <text:p text:style-name="P2"/>
      <text:p text:style-name="P2">После заголовка <text:span text:style-name="T3">и EFFECTS:</text:span> идут эффекты. <text:span text:style-name="T3">П</text:span>ишите <text:span text:style-name="T4">каждый эффект с новой строки после EFFECTS:</text:span></text:p>
      <text:p text:style-name="Standard"/>
      <text:p text:style-name="Standard">Команды эффектов:</text:p>
      <text:p text:style-name="Standard">TAR – Target. Номер параметра Metalife, например TAR25 – это RADNOW.</text:p>
      <text:p text:style-name="Standard">ADD – Добавить к значению параметра Metalife. Например ADD7 – добавить 7.</text:p>
      <text:p text:style-name="Standard">SET – Установить значение параметра Metalife. Например SET10 – установить 10.</text:p>
      <text:p text:style-name="Standard">EID<text:tab/> - Установить идентификатор эффекта. Аргумент – один символ. По умолчанию 0.</text:p>
      <text:p text:style-name="Standard">REM – Удалить один эффект с данным идентификатором (один символ). Например REMX.</text:p>
      <text:p text:style-name="Standard">REP – Сколько раз повторять эффект. По умолчанию 1.</text:p>
      <text:p text:style-name="Standard">INT – Интервал между повторениями в секундах.</text:p>
      <text:p text:style-name="Standard">AFT – Через сколько секунд сработает эффект в первый раз.</text:p>
      <text:p text:style-name="Standard">CON – Условие, при выполнении которого, эффект будет добавлен в память Пипбоя. Считается только в момент применения препарата.</text:p>
      <text:p text:style-name="Standard">Например:</text:p>
      <text:p text:style-name="Standard">CONv15&lt;v16-200</text:p>
      <text:p text:style-name="Standard">означает следующее:</text:p>
      <text:p text:style-name="Standard">v15 – параметр Metalife номер 15, то есть LIFE</text:p>
      <text:p text:style-name="Standard">v16 – параметр Metalife номер 16, то есть MAXLIFE</text:p>
      <text:p text:style-name="Standard">200 – число 200.</text:p>
      <text:p text:style-name="Standard"><text:soft-page-break/>То есть эффект, к которому добавлено это условие, добавится в память Пипбоя и будет работать при условии, что количество очков жизни меньше, чем максимальное минус 200.</text:p>
      <text:p text:style-name="Standard">Если результат условия не логический, а арифметический: 0 и меньше считается за False, 1 и больше считается за True.</text:p>
      <text:p text:style-name="Standard">Выражения с арифметическим результатом, например v15+50 можно применять как аргументы команд ADD и SET.</text:p>
      <text:p text:style-name="Standard">В выражениях можно применять функцию fRND, возвращающую значение от 0 до аргумент минус 1. Например fRND5 вернет случайное значение от 0 до 4. В качестве аргумента функции можно использовать только число, но не параметр Metalife.</text:p>
      <text:p text:style-name="Standard">Другие функции:</text:p>
      <text:p text:style-name="Standard">fQTY – принимает в качестве аргумента один символ, возвращает количество эффектов с таким идентификатором в памяти Пипбоя.</text:p>
      <text:p text:style-name="Standard">fDEL – то же самое, что fQTY, но при этом удаляет все такие эффекты.</text:p>
      <text:p text:style-name="Standard"/>
      <text:p text:style-name="Standard">Пример метки:</text:p>
      <text:p text:style-name="P5"><text:span text:style-name="T7">PROTO:</text:span>uF<text:span text:style-name="T7">2</text:span></text:p>
      <text:p text:style-name="P5"><text:span text:style-name="T7">NAME:</text:span>Вода</text:p>
      <text:p text:style-name="P7">TEXT:Утоляет жажду, но радиоактивна</text:p>
      <text:p text:style-name="P5"><text:span text:style-name="T7">USES:</text:span>1</text:p>
      <text:p text:style-name="P5"><text:span text:style-name="T7">PERK:</text:span>SUR</text:p>
      <text:p text:style-name="Standard">TAR18 ADD1000</text:p>
      <text:p text:style-name="Standard">TAR25 ADD10</text:p>
      <text:p text:style-name="Standard"/>
      <text:p text:style-name="Standard">Эта метка добавит 1000 единиц воды и 10 радиации.</text:p>
      <text:p text:style-name="Standard"/>
      <text:p text:style-name="P4">Аномали<text:span text:style-name="T3">и</text:span>:</text:p>
      <text:p text:style-name="P4">Имя сети, <text:span text:style-name="T9">например</text:span></text:p>
      <text:p text:style-name="P4">u<text:span text:style-name="T9">S</text:span>1i2575065_s3265-180_a3155400</text:p>
      <text:p text:style-name="P4"><text:span text:style-name="T9">синтакс: </text:span>pIDcVVdd(ee)MM_ <text:span text:style-name="T9">где</text:span> pID <text:span text:style-name="T9">это идентификатор протокола</text:span>, c – <text:span text:style-name="T9">символ команды</text:span>, VV – <text:span text:style-name="T9">номер переменной Metalife</text:span>, dd – <text:span text:style-name="T9">пороговый уровень сигнала</text:span> (<text:span text:style-name="T9">без</text:span> <text:span text:style-name="T9">минуса</text:span>), ee - <text:span text:style-name="T9">опционально</text:span> <text:span text:style-name="T9">каждый дБм</text:span> (<text:span text:style-name="T9">только</text:span> <text:span text:style-name="T9">для команды i</text:span>), MM – <text:span text:style-name="T9">модификатор переменной</text:span>, _ - <text:span text:style-name="T9">разделитель перед следующей командой.</text:span></text:p>
      <text:p text:style-name="P9">Имя сети не может превышать 32 символа.</text:p>
      <text:p text:style-name="P9"><text:span text:style-name="T10">Символы команд</text:span>:</text:p>
      <text:p text:style-name="P9">s – установить значение переменной (может быть отрицательным)</text:p>
      <text:p text:style-name="P9">a – добавить к значению переменной (может быть отрицательным)</text:p>
      <text:p text:style-name="P9">i – добавить к значению переменной и добавлять еще раз на каждые X дБм (ee в синтаксисе)</text:p>
      <text:p text:style-name="P8">F – для поиска аномалий мастерами. Услышавшие такую команду аномалии будут пищать и моргать 20 секунд.</text:p>
      <text:p text:style-name="P11">K – для отключения аномалий инженером. Аргумент – количество минут, которое аномалия работать не будет.</text:p>
      <text:p text:style-name="P11">R – для ремонта силовой брони инженером.</text:p>
      <text:p text:style-name="P9"/>
      <text:p text:style-name="P9"/>
      <text:p text:style-name="P10">Аномалия поддерживает следующие команды:</text:p>
      <text:p text:style-name="P10">ssid – установить имя сети</text:p>
      <text:p text:style-name="P10">power – мощность аномалии, 0-20 дБм</text:p>
      <text:p text:style-name="P11">show – показать текущий конфиг</text:p>
      <text:p text:style-name="P8">defaults – сбросить в дефолты</text:p>
      <text:p text:style-name="P12"><text:span text:style-name="T11">save – сохранить параметр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8:52:06</meta:creation-date>
    <dc:language>en-US</dc:language>
    <dc:date>2021-08-01T15:18:09.636625743</dc:date>
    <meta:editing-cycles>19</meta:editing-cycles>
    <meta:editing-duration>PT1H1M25S</meta:editing-duration>
    <meta:generator>LibreOffice/6.0.7.3$Linux_X86_64 LibreOffice_project/00m0$Build-3</meta:generator>
    <meta:document-statistic meta:table-count="0" meta:image-count="0" meta:object-count="0" meta:page-count="3" meta:paragraph-count="111" meta:word-count="921" meta:character-count="6603" meta:non-whitespace-character-count="5720"/>
  </office:meta>
</office:document-meta>
</file>